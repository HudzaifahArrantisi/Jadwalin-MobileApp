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007in" table:align="left"/>
    </style:style>
    <style:style style:name="Table1.A" style:family="table-column">
      <style:table-column-properties style:column-width="0.8042in"/>
    </style:style>
    <style:style style:name="Table1.B" style:family="table-column">
      <style:table-column-properties style:column-width="2.696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b7af7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officeooo:paragraph-rsid="000b7af7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9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1">
      <style:paragraph-properties fo:margin-top="0in" fo:margin-bottom="0in" loext:contextual-spacing="false"/>
    </style:style>
    <style:style style:name="P25" style:family="paragraph" style:parent-style-name="Text_20_body" style:list-style-name="L2">
      <style:paragraph-properties fo:margin-top="0in" fo:margin-bottom="0in" loext:contextual-spacing="false"/>
    </style:style>
    <style:style style:name="P26" style:family="paragraph" style:parent-style-name="Text_20_body" style:list-style-name="L3">
      <style:paragraph-properties fo:margin-top="0in" fo:margin-bottom="0in" loext:contextual-spacing="false"/>
    </style:style>
    <style:style style:name="P27" style:family="paragraph" style:parent-style-name="Text_20_body" style:list-style-name="L4">
      <style:paragraph-properties fo:margin-top="0in" fo:margin-bottom="0in" loext:contextual-spacing="false"/>
    </style:style>
    <style:style style:name="P28" style:family="paragraph" style:parent-style-name="Text_20_body" style:list-style-name="L5">
      <style:paragraph-properties fo:margin-top="0in" fo:margin-bottom="0in" loext:contextual-spacing="false"/>
    </style:style>
    <style:style style:name="P29" style:family="paragraph" style:parent-style-name="Text_20_body" style:list-style-name="L7">
      <style:paragraph-properties fo:margin-top="0in" fo:margin-bottom="0in" loext:contextual-spacing="false"/>
    </style:style>
    <style:style style:name="P30" style:family="paragraph" style:parent-style-name="Text_20_body" style:list-style-name="L8">
      <style:paragraph-properties fo:margin-top="0in" fo:margin-bottom="0in" loext:contextual-spacing="false"/>
    </style:style>
    <style:style style:name="P31" style:family="paragraph" style:parent-style-name="Text_20_body" style:list-style-name="L10">
      <style:paragraph-properties fo:margin-top="0in" fo:margin-bottom="0in" loext:contextual-spacing="false"/>
    </style:style>
    <style:style style:name="P32" style:family="paragraph" style:parent-style-name="Text_20_body" style:list-style-name="L11">
      <style:paragraph-properties fo:margin-top="0in" fo:margin-bottom="0in" loext:contextual-spacing="false"/>
    </style:style>
    <style:style style:name="P33" style:family="paragraph" style:parent-style-name="Text_20_body" style:list-style-name="L12">
      <style:paragraph-properties fo:margin-top="0in" fo:margin-bottom="0in" loext:contextual-spacing="false"/>
    </style:style>
    <style:style style:name="P34" style:family="paragraph" style:parent-style-name="Text_20_body" style:list-style-name="L13">
      <style:paragraph-properties fo:margin-top="0in" fo:margin-bottom="0in" loext:contextual-spacing="false"/>
    </style:style>
    <style:style style:name="P35" style:family="paragraph" style:parent-style-name="Text_20_body" style:list-style-name="L14">
      <style:paragraph-properties fo:margin-top="0in" fo:margin-bottom="0in" loext:contextual-spacing="false"/>
    </style:style>
    <style:style style:name="P36" style:family="paragraph" style:parent-style-name="Text_20_body" style:list-style-name="L19">
      <style:paragraph-properties fo:margin-top="0in" fo:margin-bottom="0in" loext:contextual-spacing="false"/>
    </style:style>
    <style:style style:name="P37" style:family="paragraph" style:parent-style-name="Text_20_body" style:list-style-name="L20">
      <style:paragraph-properties fo:margin-top="0in" fo:margin-bottom="0in" loext:contextual-spacing="false"/>
    </style:style>
    <style:style style:name="P38" style:family="paragraph" style:parent-style-name="Text_20_body" style:list-style-name="L21">
      <style:paragraph-properties fo:margin-top="0in" fo:margin-bottom="0in" loext:contextual-spacing="false"/>
    </style:style>
    <style:style style:name="P39" style:family="paragraph" style:parent-style-name="Text_20_body" style:list-style-name="L22">
      <style:paragraph-properties fo:margin-top="0in" fo:margin-bottom="0in" loext:contextual-spacing="false"/>
    </style:style>
    <style:style style:name="P40" style:family="paragraph" style:parent-style-name="Text_20_body" style:list-style-name="L23">
      <style:paragraph-properties fo:margin-top="0in" fo:margin-bottom="0in" loext:contextual-spacing="false"/>
    </style:style>
    <style:style style:name="T1" style:family="text">
      <style:text-properties officeooo:rsid="000a0c2c"/>
    </style:style>
    <style:style style:name="T2" style:family="text">
      <style:text-properties fo:font-weight="bold" officeooo:rsid="000a0c2c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“Kebocoran Password pada Sistem Akademik <text:span text:style-name="T1">Kampus</text:span>”</text:h>
      <text:h text:style-name="Heading_20_2" text:outline-level="2">Latar Belakang</text:h>
      <text:p text:style-name="Text_20_body">Sebuah sistem akademik di <text:span text:style-name="Strong_20_Emphasis"><text:span text:style-name="T2">sebuah kampus</text:span></text:span> digunakan untuk:</text:p>
      <text:list xml:id="list3462459704" text:style-name="L1">
        <text:list-item>
          <text:p text:style-name="P24">Login <text:span text:style-name="T1">mahasiswa </text:span>&amp; admin </text:p>
        </text:list-item>
        <text:list-item>
          <text:p text:style-name="P24">Penyimpanan data nilai </text:p>
        </text:list-item>
        <text:list-item>
          <text:p text:style-name="P3">Informasi keuangan </text:p>
        </text:list-item>
      </text:list>
      <text:p text:style-name="Text_20_body">Namun, sistem tersebut mengalami <text:span text:style-name="Strong_20_Emphasis">insiden kebocoran data</text:span>.<text:line-break/>Database yang bocor berisi:</text:p>
      <text:list xml:id="list1643797154" text:style-name="L2">
        <text:list-item>
          <text:p text:style-name="P25">Username </text:p>
        </text:list-item>
        <text:list-item>
          <text:p text:style-name="P4">Password (dalam bentuk hash) </text:p>
        </text:list-item>
      </text:list>
      <text:p text:style-name="Text_20_body">Contoh data bocor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3829792747520">
            <table:table-cell table:style-name="Table1.A1" office:value-type="string">
              <text:p text:style-name="Table_20_Heading">Username</text:p>
            </table:table-cell>
            <table:table-cell table:style-name="Table1.A1" office:value-type="string">
              <text:p text:style-name="Table_20_Heading">Password (Hash)</text:p>
            </table:table-cell>
          </table:table-row>
        </table:table-header-rows>
        <table:table-row table:style-name="TableLine93829792747520">
          <table:table-cell table:style-name="Table1.A1" office:value-type="string">
            <text:p text:style-name="Table_20_Contents">ahmad</text:p>
          </table:table-cell>
          <table:table-cell table:style-name="Table1.A1" office:value-type="string">
            <text:p text:style-name="Table_20_Contents">5f4dcc3b5aa765d61d8327deb882cf99</text:p>
          </table:table-cell>
        </table:table-row>
        <table:table-row table:style-name="TableLine93829792747520">
          <table:table-cell table:style-name="Table1.A1" office:value-type="string">
            <text:p text:style-name="Table_20_Contents">ali</text:p>
          </table:table-cell>
          <table:table-cell table:style-name="Table1.A1" office:value-type="string">
            <text:p text:style-name="Table_20_Contents">e99a18c428cb38d5f260853678922e03</text:p>
          </table:table-cell>
        </table:table-row>
        <table:table-row table:style-name="TableLine93829792747520">
          <table:table-cell table:style-name="Table1.A1" office:value-type="string">
            <text:p text:style-name="Table_20_Contents">fatimah</text:p>
          </table:table-cell>
          <table:table-cell table:style-name="Table1.A1" office:value-type="string">
            <text:p text:style-name="Table_20_Contents">25f9e794323b453885f5181f1b624d0b</text:p>
          </table:table-cell>
        </table:table-row>
      </table:table>
      <text:h text:style-name="Heading_20_2" text:outline-level="2">Permasalahan</text:h>
      <text:p text:style-name="Text_20_body">Tim IT menemukan bahwa:</text:p>
      <text:list xml:id="list1144828199" text:style-name="L3">
        <text:list-item>
          <text:p text:style-name="P26">Password di-hash menggunakan <text:span text:style-name="Strong_20_Emphasis">MD5</text:span> </text:p>
        </text:list-item>
        <text:list-item>
          <text:p text:style-name="P26">Tidak menggunakan <text:span text:style-name="Strong_20_Emphasis">salt</text:span> </text:p>
        </text:list-item>
        <text:list-item>
          <text:p text:style-name="P5">Tidak ada proteksi tambahan </text:p>
        </text:list-item>
      </text:list>
      <text:p text:style-name="Text_20_body">Akibatnya:</text:p>
      <text:list xml:id="list3610513036" text:style-name="L4">
        <text:list-item>
          <text:p text:style-name="P27">Hacker berhasil melakukan <text:span text:style-name="Strong_20_Emphasis">rainbow table attack</text:span> </text:p>
        </text:list-item>
        <text:list-item>
          <text:p text:style-name="P6">Banyak password berhasil ditebak </text:p>
        </text:list-item>
      </text:list>
      <text:h text:style-name="P1" text:outline-level="2"><text:s/>Pertanyaan </text:h>
      <text:list xml:id="list26261863" text:style-name="L11">
        <text:list-item>
          <text:p text:style-name="P32">Apa fungsi hash dalam keamanan sistem? </text:p>
        </text:list-item>
        <text:list-item>
          <text:p text:style-name="P11">Mengapa MD5 tidak lagi aman? </text:p>
        </text:list-item>
      </text:list>
      <text:list xml:id="list4267915054" text:style-name="L12">
        <text:list-item>
          <text:p text:style-name="P33">Mengapa penggunaan tanpa salt berbahaya? </text:p>
        </text:list-item>
        <text:list-item>
          <text:p text:style-name="P12">Bagaimana hacker bisa mengetahui password asli? </text:p>
        </text:list-item>
      </text:list>
      <text:list xml:id="list396019558" text:style-name="L13">
        <text:list-item>
          <text:p text:style-name="P34">Usulkan algoritma hash yang lebih aman </text:p>
        </text:list-item>
        <text:list-item>
          <text:p text:style-name="P13">Bagaimana cara mengamankan sistem login?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05T10:17:17.550020618</meta:creation-date>
    <dc:date>2026-05-05T10:32:00.728098692</dc:date>
    <meta:editing-duration>PT4M43S</meta:editing-duration>
    <meta:editing-cycles>1</meta:editing-cycles>
    <meta:document-statistic meta:table-count="1" meta:image-count="0" meta:object-count="0" meta:page-count="1" meta:paragraph-count="33" meta:word-count="130" meta:character-count="938" meta:non-whitespace-character-count="839"/>
    <meta:generator>LibreOffice/6.4.7.2$Linux_X86_64 LibreOffice_project/40$Build-2</meta:generator>
  </office:meta>
</office:document-meta>
</file>